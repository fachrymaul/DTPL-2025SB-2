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Matriks Gender vs Usia</text:p>
          </table:table-cell>
          <table:table-cell table:style-name="ce2" table:number-columns-repeated="3"/>
          <table:table-cell table:number-columns-repeated="4"/>
        </table:table-row>
        <table:table-row table:style-name="ro2">
          <table:table-cell table:style-name="ce2"/>
          <table:table-cell table:style-name="ce1" office:value-type="string" calcext:value-type="string">
            <text:p>17-28</text:p>
            <text:p>(Z)</text:p>
          </table:table-cell>
          <table:table-cell table:style-name="ce1" office:value-type="string" calcext:value-type="string">
            <text:p>28-35</text:p>
            <text:p>(Y)</text:p>
          </table:table-cell>
          <table:table-cell table:style-name="ce1" office:value-type="string" calcext:value-type="string">
            <text:p>35-50</text:p>
            <text:p>(X)</text:p>
          </table:table-cell>
          <table:table-cell table:style-name="ce1" office:value-type="string" calcext:value-type="string">
            <text:p>50-63</text:p>
            <text:p>(boom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ki-lak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rempua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</text:p>
          </table:table-cell>
          <table:table-cell table:number-columns-repeated="3"/>
        </table:table-row>
        <table:table-row table:style-name="ro3" table:number-rows-repeated="2">
          <table:table-cell table:style-name="ce2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The Adventure Seeker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2"/>
          <table:table-cell office:value-type="string" calcext:value-type="string">
            <text:p>Fokus: Hiking ke Puncak Gunung, konten visual yang aesthetic untuk media sosial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The Eco-Hobbyist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Kebun Strawberry, wisata edukasi lingkungan, tempat healing yang Instagrammable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The Weekend Escaper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Akses transportasi yang cepat, tempat pelarian dari penat kantor ibu kota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The Social Shopper &amp; Planner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Belanja produk UMKM desa, paket homestay untuk staycation atau kumpul teman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The Family Provider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Keamanan lokasi wisata, fasilitas parkir, dan kenyamanan akses untuk anak-anak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</text:p>
          </table:table-cell>
          <table:table-cell office:value-type="string" calcext:value-type="string">
            <text:p>The Wellness &amp; Craft Enthusiast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Produk pertanian organik, kerajinan tangan UMKM, wisata keluarga yang edukatif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</text:p>
          </table:table-cell>
          <table:table-cell office:value-type="string" calcext:value-type="string">
            <text:p>The Serenity Seeker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Ketenangan, udara bersih, dan aksesibilitas yang tidak melelahkan fisik (wisata santai)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</text:p>
          </table:table-cell>
          <table:table-cell office:value-type="string" calcext:value-type="string">
            <text:p>The Heritage &amp; Nature Admirer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string" calcext:value-type="string">
            <text:p>Fokus: Sejarah desa, keramahan lokal, dan produk olahan makanan tradisional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6:03:51.534016099</meta:creation-date>
    <dc:date>2026-04-20T16:04:20.872542506</dc:date>
    <meta:editing-duration>PT29S</meta:editing-duration>
    <meta:editing-cycles>1</meta:editing-cycles>
    <meta:document-statistic meta:table-count="1" meta:cell-count="39" meta:object-count="0"/>
    <meta:generator>LibreOffice/7.4.7.2$Linux_X86_64 LibreOffice_project/40$Build-2</meta:generator>
    <meta:user-defined meta:name="ProgId">Excel.Sheet</meta:user-defined>
  </office:meta>
</office:document-meta>
</file>